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7F000000E7A120F545.jpg"/>
  <manifest:file-entry manifest:media-type="image/jpeg" manifest:full-path="Pictures/1000000000000667000000AE4E81593F.jpg"/>
  <manifest:file-entry manifest:media-type="image/jpeg" manifest:full-path="Pictures/100000000000012200000F13CEDDA37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 2" svg:font-family="'Wingdings 2'" style:font-charset="x-symbol"/>
    <style:font-face style:name="OpenSymbol" svg:font-family="OpenSymbol, 'Arial Unicode MS'"/>
    <style:font-face style:name="Tahoma1" svg:font-family="Tahoma"/>
    <style:font-face style:name="Verdana" svg:font-family="Verdan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7cm" table:align="margins"/>
    </style:style>
    <style:style style:name="Таблица1.A" style:family="table-column">
      <style:table-column-properties style:column-width="2.536cm" style:rel-column-width="9792*"/>
    </style:style>
    <style:style style:name="Таблица1.B" style:family="table-column">
      <style:table-column-properties style:column-width="5.948cm" style:rel-column-width="22971*"/>
    </style:style>
    <style:style style:name="Таблица1.C" style:family="table-column">
      <style:table-column-properties style:column-width="2.635cm" style:rel-column-width="10180*"/>
    </style:style>
    <style:style style:name="Таблица1.D" style:family="table-column">
      <style:table-column-properties style:column-width="5.851cm" style:rel-column-width="2259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чнаяЧастьДокумента" style:family="table">
      <style:table-properties style:width="16.97cm" table:align="margins"/>
    </style:style>
    <style:style style:name="ТабличнаяЧастьДокумента.A" style:family="table-column">
      <style:table-column-properties style:column-width="0.706cm" style:rel-column-width="2724*"/>
    </style:style>
    <style:style style:name="ТабличнаяЧастьДокумента.B" style:family="table-column">
      <style:table-column-properties style:column-width="5.242cm" style:rel-column-width="20244*"/>
    </style:style>
    <style:style style:name="ТабличнаяЧастьДокумента.C" style:family="table-column">
      <style:table-column-properties style:column-width="1.568cm" style:rel-column-width="6055*"/>
    </style:style>
    <style:style style:name="ТабличнаяЧастьДокумента.D" style:family="table-column">
      <style:table-column-properties style:column-width="1.078cm" style:rel-column-width="4161*"/>
    </style:style>
    <style:style style:name="ТабличнаяЧастьДокумента.E" style:family="table-column">
      <style:table-column-properties style:column-width="2.755cm" style:rel-column-width="10639*"/>
    </style:style>
    <style:style style:name="ТабличнаяЧастьДокумента.F" style:family="table-column">
      <style:table-column-properties style:column-width="2.812cm" style:rel-column-width="10857*"/>
    </style:style>
    <style:style style:name="ТабличнаяЧастьДокумента.G" style:family="table-column">
      <style:table-column-properties style:column-width="2.812cm" style:rel-column-width="10855*"/>
    </style:style>
    <style:style style:name="ТабличнаяЧастьДокумента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чнаяЧастьДокумента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чнаяЧастьДокумента.G1" style:family="table-cell">
      <style:table-cell-properties style:vertical-align="middle" fo:padding="0.097cm" fo:border="0.002cm solid #000000"/>
    </style:style>
    <style:style style:name="ТабличнаяЧастьДокумента.A2" style:family="table-cell">
      <style:table-cell-properties fo:padding="0.097cm" fo:border-left="0.002cm solid #000000" fo:border-right="none" fo:border-top="none" fo:border-bottom="0.002cm solid #000000"/>
    </style:style>
    <style:style style:name="ТабличнаяЧастьДокумента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чнаяЧастьДокумента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чнаяЧастьДокумента.G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align="justify" style:justify-single-word="false" fo:text-indent="0.751cm" style:auto-text-indent="false"/>
    </style:style>
    <style:style style:name="P2" style:family="paragraph" style:parent-style-name="Text_20_body">
      <style:paragraph-properties fo:margin-left="0cm" fo:margin-right="0cm" fo:text-indent="0.751cm" style:auto-text-indent="false"/>
      <style:text-properties style:font-name="Times New Roman"/>
    </style:style>
    <style:style style:name="P3" style:family="paragraph" style:parent-style-name="Text_20_body">
      <style:paragraph-properties fo:margin-left="0cm" fo:margin-right="0cm" fo:text-align="center" style:justify-single-word="false" fo:text-indent="0.751cm" style:auto-text-indent="false"/>
      <style:text-properties style:font-name="Times New Roman" fo:font-size="12pt" fo:language="ru" fo:country="RU" fo:font-weight="bold" fo:background-color="transparent" style:font-size-asian="12pt" style:font-weight-asian="bold" style:font-weight-complex="bold"/>
    </style:style>
    <style:style style:name="P4" style:family="paragraph" style:parent-style-name="Text_20_body">
      <style:paragraph-properties fo:margin-left="0cm" fo:margin-right="0cm" fo:text-align="justify" style:justify-single-word="false" fo:text-indent="0.751cm" style:auto-text-indent="false"/>
      <style:text-properties style:font-name="Times New Roman" fo:font-size="12pt" fo:background-color="transparent" style:font-size-asian="12pt"/>
    </style:style>
    <style:style style:name="P5" style:family="paragraph" style:parent-style-name="Text_20_body">
      <style:paragraph-properties fo:margin-left="0cm" fo:margin-right="0cm" fo:text-align="justify" style:justify-single-word="false" fo:text-indent="0.751cm" style:auto-text-indent="false"/>
      <style:text-properties style:font-name="Times New Roman"/>
    </style:style>
    <style:style style:name="P6" style:family="paragraph" style:parent-style-name="Text_20_body">
      <style:paragraph-properties fo:margin-left="0cm" fo:margin-right="0cm" fo:text-indent="0.751cm" style:auto-text-indent="false"/>
      <style:text-properties style:font-name="Times New Roman" fo:font-size="11pt" fo:language="en" fo:country="US"/>
    </style:style>
    <style:style style:name="P7" style:family="paragraph" style:parent-style-name="Text_20_body">
      <style:paragraph-properties fo:margin-left="0cm" fo:margin-right="0cm" fo:text-align="center" style:justify-single-word="false" fo:text-indent="0.751cm" style:auto-text-indent="false"/>
      <style:text-properties style:font-name="Times New Roman" fo:font-size="13pt" fo:font-weight="bold" style:font-name-asian="Verdana1" style:font-size-asian="13pt" style:font-weight-asian="bold" style:font-name-complex="Verdana1" style:font-size-complex="13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.751cm" style:auto-text-indent="false"/>
      <style:text-properties style:font-name="Candara" fo:font-size="12pt" fo:language="en" fo:country="US" fo:font-weight="bold" fo:background-color="transparent" style:font-size-asian="12pt" style:font-weight-asian="bold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.751cm" style:auto-text-indent="false"/>
      <style:text-properties style:use-window-font-color="true" style:font-name="Times New Roman" fo:font-size="12pt" fo:language="ru" fo:country="RU" fo:font-style="normal" fo:font-weight="normal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0.751cm" style:auto-text-indent="false"/>
      <style:text-properties fo:color="#000000" style:font-name="Times New Roman" fo:font-size="12pt" fo:language="ru" fo:country="RU" fo:font-style="normal" style:text-underline-style="none" fo:font-weight="normal" fo:background-color="transparent" style:font-name-asian="Verdana1" style:font-size-asian="12pt" style:language-asian="zxx" style:country-asian="none" style:font-style-asian="normal" style:font-weight-asian="normal" style:font-name-complex="Verdana1" style:font-size-complex="12pt" style:language-complex="zxx" style:country-complex="none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.751cm" style:auto-text-indent="false"/>
      <style:text-properties fo:color="#000000" style:font-name="Times New Roman" fo:font-weight="normal" style:font-name-asian="Verdana1" style:font-weight-asian="normal" style:font-name-complex="Verdana1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751cm" style:auto-text-indent="false"/>
      <style:text-properties fo:color="#000000" style:font-name="Times New Roman" fo:font-weight="normal" style:font-name-asian="Verdana1" style:font-weight-asian="normal" style:font-name-complex="Verdana1" style:font-weight-complex="normal"/>
    </style:style>
    <style:style style:name="P13" style:family="paragraph" style:parent-style-name="Standard">
      <style:paragraph-properties fo:margin-left="0cm" fo:margin-right="0cm" fo:text-indent="0.751cm" style:auto-text-indent="false"/>
      <style:text-properties style:use-window-font-color="true" style:font-name="Times New Roman" fo:font-size="12pt" fo:language="en" fo:country="US" fo:font-style="italic" style:text-underline-style="none" fo:font-weight="normal" fo:background-color="transparent" style:font-name-asian="Verdana" style:font-size-asian="12pt" style:language-asian="zxx" style:country-asian="none" style:font-style-asian="italic" style:font-weight-asian="normal" style:font-name-complex="Verdana" style:font-size-complex="12pt" style:language-complex="zxx" style:country-complex="none" style:font-style-complex="italic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794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.794cm" style:auto-text-indent="false"/>
      <style:text-properties style:use-window-font-color="true" style:font-name="Times New Roman" fo:font-size="12pt" fo:language="ru" fo:country="RU" fo:font-style="normal" fo:font-weight="normal" fo:background-color="transparent" style:font-name-asian="Verdana1" style:font-size-asian="12pt" style:language-asian="zxx" style:country-asian="none" style:font-style-asian="normal" style:font-weight-asian="normal" style:font-name-complex="Verdana1" style:font-size-complex="12pt" style:language-complex="zxx" style:country-complex="none" style:font-style-complex="normal" style:font-weight-complex="normal"/>
    </style:style>
    <style:style style:name="P16" style:family="paragraph" style:parent-style-name="Text_20_body">
      <style:paragraph-properties fo:margin-left="0cm" fo:margin-right="0cm" fo:text-align="justify" style:justify-single-word="false" fo:text-indent="0.764cm" style:auto-text-indent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0.764cm" style:auto-text-indent="false">
        <style:tab-stops>
          <style:tab-stop style:position="1.247cm"/>
        </style:tab-stops>
      </style:paragraph-properties>
      <style:text-properties fo:color="#000000" style:font-name="Times New Roman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0.736cm" style:auto-text-indent="false">
        <style:tab-stops>
          <style:tab-stop style:position="1.247cm"/>
        </style:tab-stops>
      </style:paragraph-properties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text-indent="0.736cm" style:auto-text-indent="false">
        <style:tab-stops>
          <style:tab-stop style:position="1.247cm"/>
        </style:tab-stops>
      </style:paragraph-properties>
    </style:style>
    <style:style style:name="P20" style:family="paragraph" style:parent-style-name="Text_20_body">
      <style:paragraph-properties fo:margin-left="0cm" fo:margin-right="0cm" fo:text-align="justify" style:justify-single-word="false" fo:text-indent="0.736cm" style:auto-text-indent="false">
        <style:tab-stops>
          <style:tab-stop style:position="1.247cm"/>
        </style:tab-stops>
      </style:paragraph-properties>
      <style:text-properties fo:color="#000000" style:font-name="Times New Roman" fo:font-weight="normal" style:font-weight-asian="normal" style:font-weight-complex="normal"/>
    </style:style>
    <style:style style:name="P21" style:family="paragraph" style:parent-style-name="Text_20_body">
      <style:text-properties style:font-name="Candara" fo:language="en" fo:country="US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text-properties style:font-name="Times New Roman" fo:language="en" fo:country="US"/>
    </style:style>
    <style:style style:name="P24" style:family="paragraph" style:parent-style-name="Text_20_body">
      <style:text-properties style:font-name="Times New Roman" fo:font-size="12pt" fo:font-style="italic" style:font-size-asian="12pt" style:font-style-asian="italic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text-properties style:font-name="Times New Roman" fo:language="ru" fo:country="RU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3pt" fo:font-weight="bold" style:font-name-asian="Verdana1" style:font-size-asian="13pt" style:font-weight-asian="bold" style:font-name-complex="Verdana1" style:font-size-complex="13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weight="bold" style:font-name-asian="Verdana1" style:font-weight-asian="bold" style:font-name-complex="Verdana1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P30" style:family="paragraph" style:parent-style-name="Standard">
      <style:text-properties style:use-window-font-color="true" style:font-name="Times New Roman" fo:font-size="12pt" fo:language="ru" fo:country="RU" fo:font-style="italic" style:text-underline-style="none" fo:font-weight="normal" style:font-name-asian="Verdana" style:font-size-asian="12pt" style:language-asian="zxx" style:country-asian="none" style:font-style-asian="italic" style:font-weight-asian="normal" style:font-name-complex="Verdana" style:font-size-complex="12pt" style:language-complex="zxx" style:country-complex="none" style:font-style-complex="italic" style:font-weight-complex="normal"/>
    </style:style>
    <style:style style:name="P31" style:family="paragraph" style:parent-style-name="Text_20_body">
      <style:paragraph-properties fo:break-before="page"/>
      <style:text-properties style:font-name="Times New Roman" fo:language="en" fo:country="US"/>
    </style:style>
    <style:style style:name="P32" style:family="paragraph" style:parent-style-name="Table_20_Contents">
      <style:text-properties style:font-name="Times New Roman"/>
    </style:style>
    <style:style style:name="P33" style:family="paragraph" style:parent-style-name="Table_20_Contents">
      <style:text-properties style:font-name="Times New Roman" fo:font-weight="bold" style:font-weight-asian="bold" style:font-weight-complex="bold"/>
    </style:style>
    <style:style style:name="P34" style:family="paragraph" style:parent-style-name="Table_20_Contents">
      <style:text-properties style:font-name="Times New Roman"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fo:font-weight="bold" style:font-size-asian="10pt" style:font-weight-asian="bold" style:font-name-complex="Times New Roman1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0pt" fo:font-weight="bold"/>
    </style:style>
    <style:style style:name="P39" style:family="paragraph" style:parent-style-name="Table_20_Contents">
      <style:paragraph-properties fo:text-align="end" style:justify-single-word="false"/>
      <style:text-properties style:font-name="Times New Roman"/>
    </style:style>
    <style:style style:name="P40" style:family="paragraph" style:parent-style-name="Standard">
      <style:paragraph-properties fo:margin-left="0cm" fo:margin-right="0cm" fo:text-align="start" style:justify-single-word="false" fo:text-indent="1cm" style:auto-text-indent="false" fo:background-color="transparent">
        <style:background-image/>
      </style:paragraph-properties>
      <style:text-properties style:use-window-font-color="true" style:font-name="Times New Roman" fo:font-size="12pt" fo:language="ru" fo:country="RU" fo:font-style="normal" fo:font-weight="normal" fo:background-color="transparent" style:font-name-asian="Verdana" style:font-size-asian="12pt" style:language-asian="zxx" style:country-asian="none" style:font-style-asian="normal" style:font-weight-asian="normal" style:font-name-complex="Verdana" style:font-size-complex="12pt" style:language-complex="zxx" style:country-complex="none" style:font-style-complex="normal" style:font-weight-complex="normal"/>
    </style:style>
    <style:style style:name="P41" style:family="paragraph" style:parent-style-name="Text_20_body" style:list-style-name="WW8Num4">
      <style:paragraph-properties fo:margin-left="1.247cm" fo:margin-right="0cm" fo:margin-top="0cm" fo:margin-bottom="0cm" fo:text-align="justify" style:justify-single-word="false" fo:text-indent="-0.499cm" style:auto-text-indent="false">
        <style:tab-stops>
          <style:tab-stop style:position="1.247cm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42" style:family="paragraph" style:parent-style-name="Text_20_body" style:list-style-name="WW8Num4">
      <style:paragraph-properties fo:margin-left="1.247cm" fo:margin-right="0cm" fo:margin-top="0cm" fo:margin-bottom="0cm" fo:text-align="justify" style:justify-single-word="false" fo:text-indent="-0.499cm" style:auto-text-indent="false">
        <style:tab-stops>
          <style:tab-stop style:position="1.247cm"/>
        </style:tab-stops>
      </style:paragraph-properties>
      <style:text-properties fo:color="#000000" style:font-name="Times New Roman" fo:font-weight="normal" style:font-weight-asian="normal" style:font-weight-complex="normal"/>
    </style:style>
    <style:style style:name="P43" style:family="paragraph" style:parent-style-name="Text_20_body" style:list-style-name="WW8Num4">
      <style:paragraph-properties fo:margin-left="1.247cm" fo:margin-right="0cm" fo:line-height="100%" fo:text-align="justify" style:justify-single-word="false" fo:text-indent="-0.499cm" style:auto-text-indent="false">
        <style:tab-stops>
          <style:tab-stop style:position="1.247cm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0cm" fo:margin-right="0cm" fo:text-indent="0.751cm" style:auto-text-indent="false"/>
      <style:text-properties style:font-name="Times New Roman" fo:font-weight="bold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Times New Roman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/>
    </style:style>
    <style:style style:name="P47" style:family="paragraph" style:parent-style-name="Table_20_Contents">
      <style:text-properties style:font-name="Times New Roman" fo:language="ru" fo:country="RU"/>
    </style:style>
    <style:style style:name="P48" style:family="paragraph" style:parent-style-name="Table_20_Contents">
      <style:text-properties style:font-name="Times New Roman" fo:font-weight="bold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51" style:family="paragraph" style:parent-style-name="Heading_20_1">
      <style:paragraph-properties fo:margin-left="0cm" fo:margin-right="0cm" fo:text-indent="0.751cm" style:auto-text-indent="false"/>
      <style:text-properties style:font-name="Times New Roman" fo:font-style="italic"/>
    </style:style>
    <style:style style:name="T1" style:family="text">
      <style:text-properties fo:font-size="12pt"/>
    </style:style>
    <style:style style:name="T2" style:family="text">
      <style:text-properties fo:font-size="12pt" fo:language="en" fo:country="US"/>
    </style:style>
    <style:style style:name="T3" style:family="text">
      <style:text-properties fo:font-size="12pt" fo:language="en" fo:country="US" fo:font-style="italic" style:font-size-asian="12pt" style:font-style-asian="italic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language="ru" fo:country="RU"/>
    </style:style>
    <style:style style:name="T6" style:family="text">
      <style:text-properties fo:font-size="12pt" fo:language="ru" fo:country="RU" fo:font-style="italic" style:font-size-asian="12pt" style:font-style-asian="italic"/>
    </style:style>
    <style:style style:name="T7" style:family="text">
      <style:text-properties fo:font-size="12pt" fo:font-weight="bold"/>
    </style:style>
    <style:style style:name="T8" style:family="text">
      <style:text-properties fo:language="ru" fo:country="RU" fo:font-weight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/>
    </style:style>
    <style:style style:name="T12" style:family="text">
      <style:text-properties fo:font-size="11pt" fo:language="en" fo:country="US"/>
    </style:style>
    <style:style style:name="T13" style:family="text">
      <style:text-properties fo:font-size="11pt" fo:language="ru" fo:country="RU"/>
    </style:style>
    <style:style style:name="T14" style:family="text">
      <style:text-properties style:use-window-font-color="true" fo:font-size="12pt" fo:language="en" fo:country="US" fo:font-style="italic" style:text-underline-style="none" fo:font-weight="normal" fo:background-color="transparent" style:font-name-asian="Verdana" style:font-size-asian="12pt" style:language-asian="zxx" style:country-asian="none" style:font-style-asian="italic" style:font-weight-asian="normal" style:font-name-complex="Verdana" style:font-size-complex="12pt" style:language-complex="zxx" style:country-complex="none" style:font-style-complex="italic" style:font-weight-complex="normal"/>
    </style:style>
    <style:style style:name="T15" style:family="text">
      <style:text-properties style:use-window-font-color="true" fo:font-size="12pt" fo:language="ru" fo:country="RU" fo:font-style="italic" style:text-underline-style="none" fo:font-weight="normal" fo:background-color="transparent" style:font-name-asian="Verdana" style:font-size-asian="12pt" style:language-asian="zxx" style:country-asian="none" style:font-style-asian="italic" style:font-weight-asian="normal" style:font-name-complex="Verdana" style:font-size-complex="12pt" style:language-complex="zxx" style:country-complex="none" style:font-style-complex="italic" style:font-weight-complex="normal"/>
    </style:style>
    <style:style style:name="T16" style:family="text">
      <style:text-properties style:use-window-font-color="true" style:font-name="Times New Roman" fo:font-weight="normal" style:font-name-asian="Verdana1" style:font-weight-asian="normal" style:font-name-complex="Verdana1" style:font-weight-complex="normal"/>
    </style:style>
    <style:style style:name="T17" style:family="text">
      <style:text-properties fo:color="#000000" fo:font-size="12pt" fo:language="en" fo:country="US" fo:font-style="italic" fo:font-weight="normal" fo:background-color="transparent" style:font-name-asian="Lucida Sans Unicode" style:font-size-asian="12pt" style:language-asian="zxx" style:country-asian="none" style:font-style-asian="italic" style:font-weight-asian="normal" style:font-name-complex="Tahoma2" style:font-size-complex="12pt" style:language-complex="zxx" style:country-complex="none" style:font-style-complex="italic" style:font-weight-complex="normal"/>
    </style:style>
    <style:style style:name="T18" style:family="text">
      <style:text-properties fo:color="#000000" fo:font-size="12pt" fo:language="ru" fo:country="RU" fo:font-style="italic" fo:font-weight="normal" fo:background-color="transparent" style:font-name-asian="Lucida Sans Unicode" style:font-size-asian="12pt" style:language-asian="zxx" style:country-asian="none" style:font-style-asian="italic" style:font-weight-asian="normal" style:font-name-complex="Tahoma2" style:font-size-complex="12pt" style:language-complex="zxx" style:country-complex="none" style:font-style-complex="italic" style:font-weight-complex="normal"/>
    </style:style>
    <style:style style:name="T19" style:family="text">
      <style:text-properties fo:color="#000000" style:font-name="Times New Roman" fo:font-weight="bold" style:font-name-asian="Verdana1" style:font-weight-asian="bold" style:font-name-complex="Verdana1" style:font-weight-complex="bold"/>
    </style:style>
    <style:style style:name="T20" style:family="text">
      <style:text-properties fo:color="#000000" style:font-name="Times New Roman" fo:language="en" fo:country="US" fo:font-weight="normal" style:font-name-asian="Verdana1" style:font-weight-asian="normal" style:font-name-complex="Verdana1" style:font-weight-complex="normal"/>
    </style:style>
    <style:style style:name="T21" style:family="text">
      <style:text-properties fo:color="#000000" style:font-name="Times New Roman" fo:font-weight="normal" style:font-name-asian="Verdana1" style:font-weight-asian="normal" style:font-name-complex="Verdana1" style:font-weight-complex="normal"/>
    </style:style>
    <style:style style:name="T22" style:family="text"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style:font-name="Times New Roman" style:text-underline-style="solid" style:text-underline-width="auto" style:text-underline-color="font-color" fo:font-weight="bold" style:font-name-asian="Verdana1" style:font-weight-asian="bold" style:font-name-complex="Verdana1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font-size="10pt"/>
    </style:style>
    <style:style style:name="T29" style:family="text">
      <style:text-properties fo:font-size="10pt" fo:language="en" fo:country="US"/>
    </style:style>
    <style:style style:name="T30" style:family="text">
      <style:text-properties fo:font-size="10pt" fo:font-weight="bold"/>
    </style:style>
    <style:style style:name="T31" style:family="text">
      <style:text-properties style:font-name="Times New Roman" fo:language="en" fo:country="US"/>
    </style:style>
    <style:style style:name="T32" style:family="text">
      <style:text-properties style:font-name="Times New Roman" fo:font-weight="normal" style:font-name-asian="Verdana1" style:font-weight-asian="normal" style:font-name-complex="Verdana1" style:font-weight-complex="normal"/>
    </style:style>
    <style:style style:name="T33" style:family="text">
      <style:text-properties style:font-name="Times New Roman" fo:font-weight="normal" style:font-weight-asian="normal" style:font-weight-complex="normal"/>
    </style:style>
    <style:style style:name="T34" style:family="text">
      <style:text-properties style:font-name="Times New Roman" fo:font-size="12pt" fo:font-style="italic" fo:font-weight="bold" style:font-style-asian="italic" style:font-weight-asian="bold" style:font-weight-complex="bold"/>
    </style:style>
    <style:style style:name="T35" style:family="text">
      <style:text-properties style:font-name="Times New Roman" fo:font-size="12pt" fo:font-weight="normal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2" text:anchor-type="page" text:anchor-page-number="1" svg:x="0.028cm" svg:y="1.434cm" svg:width="2.039cm" svg:height="29.676cm" draw:z-index="2">
        <draw:image xlink:href="Pictures/100000000000012200000F13CEDDA374.jpg" xlink:type="simple" xlink:show="embed" xlink:actuate="onLoad"/>
      </draw:frame>
      <draw:frame draw:style-name="fr2" draw:name="Графический объект4" text:anchor-type="page" text:anchor-page-number="2" svg:x="0.028cm" svg:y="0.095cm" svg:width="1.97cm" svg:height="29.603cm" draw:z-index="1">
        <draw:image xlink:href="Pictures/100000000000012200000F13CEDDA374.jpg" xlink:type="simple" xlink:show="embed" xlink:actuate="onLoad"/>
      </draw:frame>
      <draw:frame draw:style-name="fr1" draw:name="Графический объект1" text:anchor-type="page" text:anchor-page-number="3" svg:x="0.028cm" svg:y="0.339cm" svg:width="1.97cm" svg:height="29.603cm" draw:z-index="0">
        <draw:image xlink:href="Pictures/100000000000012200000F13CEDDA374.jpg" xlink:type="simple" xlink:show="embed" xlink:actuate="onLoad"/>
      </draw:frame>
      <draw:frame draw:style-name="fr3" draw:name="Рисунок 5" text:anchor-type="page" text:anchor-page-number="1" svg:x="2.028cm" svg:y="0.023cm" svg:width="18.949cm" style:rel-width="scale" svg:height="2.011cm" style:rel-height="scale" draw:z-index="3">
        <draw:image xlink:href="Pictures/1000000000000667000000AE4E81593F.jpg" xlink:type="simple" xlink:show="embed" xlink:actuate="onLoad"/>
      </draw:frame>
      <text:p text:style-name="P21"><draw:frame draw:style-name="fr4" draw:name="Графический объект3" text:anchor-type="paragraph" svg:x="0cm" svg:y="-0.85cm" svg:width="18.971cm" svg:height="2.014cm" draw:z-index="4"><draw:image xlink:href="Pictures/100000000000087F000000E7A120F545.jpg" xlink:type="simple" xlink:show="embed" xlink:actuate="onLoad"/></draw:frame>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2"><text:span text:style-name="T7">Кому:</text:span> </text:p>
          </table:table-cell>
          <table:table-cell table:style-name="Таблица1.A1" office:value-type="string">
            <text:p text:style-name="P47"><text:span text:style-name="T28">Алексей</text:span></text:p>
          </table:table-cell>
          <table:table-cell table:style-name="Таблица1.A1" office:value-type="string">
            <text:p text:style-name="P32"><text:span text:style-name="T7">От:</text:span> </text:p>
          </table:table-cell>
          <table:table-cell table:style-name="Таблица1.D1" office:value-type="string">
            <text:p text:style-name="P32"><text:span text:style-name="T1">Курганский Александр</text:span> </text:p>
          </table:table-cell>
        </table:table-row>
        <table:table-row>
          <table:table-cell table:style-name="Таблица1.A2" office:value-type="string">
            <text:p text:style-name="P32"><text:span text:style-name="T7">Компания:</text:span> </text:p>
          </table:table-cell>
          <table:table-cell table:style-name="Таблица1.A2" office:value-type="string">
            <text:p text:style-name="P32"><text:span text:style-name="T1">Физическое лицо</text:span> </text:p>
          </table:table-cell>
          <table:table-cell table:style-name="Таблица1.A2" office:value-type="string">
            <text:p text:style-name="P32"><text:span text:style-name="T7">Дата:</text:span> </text:p>
          </table:table-cell>
          <table:table-cell table:style-name="Таблица1.D2" office:value-type="string">
            <text:p text:style-name="P22"><text:span text:style-name="T2">24.12.2020</text:span></text:p>
          </table:table-cell>
        </table:table-row>
        <table:table-row>
          <table:table-cell table:style-name="Таблица1.A2" office:value-type="string">
            <text:p text:style-name="P32"><text:span text:style-name="T7">Тел\Факс:</text:span> </text:p>
          </table:table-cell>
          <table:table-cell table:style-name="Таблица1.A2" office:value-type="string">
            <text:p text:style-name="P32"><text:s/></text:p>
          </table:table-cell>
          <table:table-cell table:style-name="Таблица1.A2" office:value-type="string">
            <text:p text:style-name="P33">№</text:p>
          </table:table-cell>
          <table:table-cell table:style-name="Таблица1.D2" office:value-type="string">
            <text:p text:style-name="P34">112</text:p>
          </table:table-cell>
        </table:table-row>
      </table:table>
      <text:p text:style-name="P22"/>
      <text:h text:style-name="P51" text:outline-level="1" text:is-list-header="true">Коммерческое предложение</text:h>
      <text:p text:style-name="P5"/>
      <text:p text:style-name="P2"><text:span text:style-name="T3">Уважаемая</text:span> <text:span text:style-name="T4">Яна</text:span><text:span text:style-name="T4">,</text:span></text:p>
      <text:p text:style-name="P9">благодарим Вас за оказанное доверие и возможность принять участие в автоматизации Вашего предприятия.</text:p>
      <text:p text:style-name="P4">На основании предварительной информации мы составили для вас предложение, которое готовы обсудить, дополнить после получения от Вас дополнительной информации.</text:p>
      <text:p text:style-name="P22"/>
      <text:p text:style-name="P24"><text:tab/>С наилучшими пожеланиями,</text:p>
      <text:p text:style-name="P25"><text:span text:style-name="T14"><text:tab/>Менеджер по продажам</text:span></text:p>
      <text:p text:style-name="P25"><text:span text:style-name="T17"><text:tab/>Курганский Александр</text:span></text:p>
      <text:p text:style-name="P30"><text:tab/>тел./факс: +7 (343) 288-75-45 (многоканальный)</text:p>
      <text:p text:style-name="P30"><text:tab/></text:p>
      <text:p text:style-name="P25"><text:span text:style-name="T15"><text:tab/>e-mail: kurg@tlink.ru</text:span></text:p>
      <text:p text:style-name="P13"><text:tab/>www.tlink.ru</text:p>
      <text:p text:style-name="P26"/>
      <text:p text:style-name="P31"><text:span text:style-name="T25">Коммерческое предложение</text:span></text:p>
      <table:table table:name="ТабличнаяЧастьДокумента" table:style-name="ТабличнаяЧастьДокумента">
        <table:table-column table:style-name="ТабличнаяЧастьДокумента.A"/>
        <table:table-column table:style-name="ТабличнаяЧастьДокумента.B"/>
        <table:table-column table:style-name="ТабличнаяЧастьДокумента.C"/>
        <table:table-column table:style-name="ТабличнаяЧастьДокумента.D"/>
        <table:table-column table:style-name="ТабличнаяЧастьДокумента.E"/>
        <table:table-column table:style-name="ТабличнаяЧастьДокумента.F"/>
        <table:table-column table:style-name="ТабличнаяЧастьДокумента.G"/>
        <table:table-row>
          <table:table-cell table:style-name="ТабличнаяЧастьДокумента.A1" office:value-type="string">
            <text:p text:style-name="P32">№ </text:p>
          </table:table-cell>
          <table:table-cell table:style-name="ТабличнаяЧастьДокумента.B1" office:value-type="string">
            <text:p text:style-name="P35"><text:span text:style-name="T30">Программы, услуги, работы</text:span> </text:p>
          </table:table-cell>
          <table:table-cell table:style-name="ТабличнаяЧастьДокумента.B1" office:value-type="string">
            <text:p text:style-name="P36"><text:span text:style-name="T9">Ко</text:span><text:span text:style-name="T9">л-</text:span><text:span text:style-name="T9">в</text:span><text:span text:style-name="T8">о</text:span></text:p>
          </table:table-cell>
          <table:table-cell table:style-name="ТабличнаяЧастьДокумента.B1" office:value-type="string">
            <text:p text:style-name="P35"><text:span text:style-name="T30">Ед.</text:span> </text:p>
          </table:table-cell>
          <table:table-cell table:style-name="ТабличнаяЧастьДокумента.B1" office:value-type="string">
            <text:p text:style-name="P35"><text:span text:style-name="T30">Цена, </text:span><text:span text:style-name="T30">руб.</text:span></text:p>
          </table:table-cell>
          <table:table-cell table:style-name="ТабличнаяЧастьДокумента.B1" office:value-type="string">
            <text:p text:style-name="P37">Скидка, руб</text:p>
          </table:table-cell>
          <table:table-cell table:style-name="ТабличнаяЧастьДокумента.G1" office:value-type="string">
            <text:p text:style-name="P38">Сумма, руб.</text:p>
          </table:table-cell>
        </table:table-row>
        <table:table-row>
          <table:table-cell table:style-name="ТабличнаяЧастьДокумента.A2" office:value-type="string">
            <text:p text:style-name="P33"/>
          </table:table-cell>
          <table:table-cell table:style-name="ТабличнаяЧастьДокумента.B2" office:value-type="string">
            <text:p text:style-name="P49">Программное обеспечение</text:p>
          </table:table-cell>
          <table:table-cell table:style-name="ТабличнаяЧастьДокумента.B2" office:value-type="string">
            <text:p text:style-name="P50"/>
          </table:table-cell>
          <table:table-cell table:style-name="ТабличнаяЧастьДокумента.B2" office:value-type="string">
            <text:p text:style-name="P50"/>
          </table:table-cell>
          <table:table-cell table:style-name="ТабличнаяЧастьДокумента.B2" office:value-type="string">
            <text:p text:style-name="P50"/>
          </table:table-cell>
          <table:table-cell table:style-name="ТабличнаяЧастьДокумента.B2" office:value-type="string">
            <text:p text:style-name="P50"/>
          </table:table-cell>
          <table:table-cell table:style-name="ТабличнаяЧастьДокумента.G2" office:value-type="string">
            <text:p text:style-name="P50"/>
          </table:table-cell>
        </table:table-row>
        <table:table-row>
          <table:table-cell table:style-name="ТабличнаяЧастьДокумента.A2" office:value-type="string">
            <text:p text:style-name="P46">1</text:p>
          </table:table-cell>
          <table:table-cell table:style-name="ТабличнаяЧастьДокумента.A2" office:value-type="string">
            <text:p text:style-name="P46">1С:Предприятие 8. Управление ритуальными услугами</text:p>
          </table:table-cell>
          <table:table-cell table:style-name="ТабличнаяЧастьДокумента.A2" office:value-type="string">
            <text:p text:style-name="P39">1,000</text:p>
          </table:table-cell>
          <table:table-cell table:style-name="ТабличнаяЧастьДокумента.A2" office:value-type="string">
            <text:p text:style-name="P39">шт</text:p>
          </table:table-cell>
          <table:table-cell table:style-name="ТабличнаяЧастьДокумента.A2" office:value-type="string">
            <text:p text:style-name="P39">35 000,00</text:p>
          </table:table-cell>
          <table:table-cell table:style-name="ТабличнаяЧастьДокумента.A2" office:value-type="string">
            <text:p text:style-name="P39"/>
          </table:table-cell>
          <table:table-cell table:style-name="ТабличнаяЧастьДокумента.G3" office:value-type="string">
            <text:p text:style-name="P39">35 000,00</text:p>
          </table:table-cell>
        </table:table-row>
        <table:table-row>
          <table:table-cell table:style-name="ТабличнаяЧастьДокумента.A2" office:value-type="string">
            <text:p text:style-name="P49"/>
          </table:table-cell>
          <table:table-cell table:style-name="ТабличнаяЧастьДокумента.A2" office:value-type="string">
            <text:p text:style-name="P49">Итого по Программное обеспечение</text:p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G3" office:value-type="string">
            <text:p text:style-name="P50">35 000,00</text:p>
          </table:table-cell>
        </table:table-row>
        <table:table-row>
          <table:table-cell table:style-name="ТабличнаяЧастьДокумента.A2" office:value-type="string">
            <text:p text:style-name="P49"/>
          </table:table-cell>
          <table:table-cell table:style-name="ТабличнаяЧастьДокумента.A2" office:value-type="string">
            <text:p text:style-name="P49">Лицензии на рабочие места</text:p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G3" office:value-type="string">
            <text:p text:style-name="P50"/>
          </table:table-cell>
        </table:table-row>
        <table:table-row>
          <table:table-cell table:style-name="ТабличнаяЧастьДокумента.A2" office:value-type="string">
            <text:p text:style-name="P46">2</text:p>
          </table:table-cell>
          <table:table-cell table:style-name="ТабличнаяЧастьДокумента.A2" office:value-type="string">
            <text:p text:style-name="P46">1С:Управление ритуальными услугами. Клиентская лицензия на 5 рабочих мест</text:p>
          </table:table-cell>
          <table:table-cell table:style-name="ТабличнаяЧастьДокумента.A2" office:value-type="string">
            <text:p text:style-name="P39">1,000</text:p>
          </table:table-cell>
          <table:table-cell table:style-name="ТабличнаяЧастьДокумента.A2" office:value-type="string">
            <text:p text:style-name="P39">шт</text:p>
          </table:table-cell>
          <table:table-cell table:style-name="ТабличнаяЧастьДокумента.A2" office:value-type="string">
            <text:p text:style-name="P39">21 600,00</text:p>
          </table:table-cell>
          <table:table-cell table:style-name="ТабличнаяЧастьДокумента.A2" office:value-type="string">
            <text:p text:style-name="P39"/>
          </table:table-cell>
          <table:table-cell table:style-name="ТабличнаяЧастьДокумента.G3" office:value-type="string">
            <text:p text:style-name="P39">21 600,00</text:p>
          </table:table-cell>
        </table:table-row>
        <table:table-row>
          <table:table-cell table:style-name="ТабличнаяЧастьДокумента.A2" office:value-type="string">
            <text:p text:style-name="P46">3</text:p>
          </table:table-cell>
          <table:table-cell table:style-name="ТабличнаяЧастьДокумента.A2" office:value-type="string">
            <text:p text:style-name="P46">Лицензия Сервер МИНИ на 5 подключений 1С:Предприятие 8.3.</text:p>
          </table:table-cell>
          <table:table-cell table:style-name="ТабличнаяЧастьДокумента.A2" office:value-type="string">
            <text:p text:style-name="P39">1,000</text:p>
          </table:table-cell>
          <table:table-cell table:style-name="ТабличнаяЧастьДокумента.A2" office:value-type="string">
            <text:p text:style-name="P39">шт</text:p>
          </table:table-cell>
          <table:table-cell table:style-name="ТабличнаяЧастьДокумента.A2" office:value-type="string">
            <text:p text:style-name="P39">14 400,00</text:p>
          </table:table-cell>
          <table:table-cell table:style-name="ТабличнаяЧастьДокумента.A2" office:value-type="string">
            <text:p text:style-name="P39"/>
          </table:table-cell>
          <table:table-cell table:style-name="ТабличнаяЧастьДокумента.G3" office:value-type="string">
            <text:p text:style-name="P39">14 400,00</text:p>
          </table:table-cell>
        </table:table-row>
        <table:table-row>
          <table:table-cell table:style-name="ТабличнаяЧастьДокумента.A2" office:value-type="string">
            <text:p text:style-name="P46">4</text:p>
          </table:table-cell>
          <table:table-cell table:style-name="ТабличнаяЧастьДокумента.A2" office:value-type="string">
            <text:p text:style-name="P46">1С:Управление ритуальными услугами. Мобильная клиентская лицензия на 1 рабочее место</text:p>
          </table:table-cell>
          <table:table-cell table:style-name="ТабличнаяЧастьДокумента.A2" office:value-type="string">
            <text:p text:style-name="P39">5,000</text:p>
          </table:table-cell>
          <table:table-cell table:style-name="ТабличнаяЧастьДокумента.A2" office:value-type="string">
            <text:p text:style-name="P39">шт</text:p>
          </table:table-cell>
          <table:table-cell table:style-name="ТабличнаяЧастьДокумента.A2" office:value-type="string">
            <text:p text:style-name="P39">2 000,00</text:p>
          </table:table-cell>
          <table:table-cell table:style-name="ТабличнаяЧастьДокумента.A2" office:value-type="string">
            <text:p text:style-name="P39"/>
          </table:table-cell>
          <table:table-cell table:style-name="ТабличнаяЧастьДокумента.G3" office:value-type="string">
            <text:p text:style-name="P39">10 000,00</text:p>
          </table:table-cell>
        </table:table-row>
        <table:table-row>
          <table:table-cell table:style-name="ТабличнаяЧастьДокумента.A2" office:value-type="string">
            <text:p text:style-name="P49"/>
          </table:table-cell>
          <table:table-cell table:style-name="ТабличнаяЧастьДокумента.A2" office:value-type="string">
            <text:p text:style-name="P49">Итого по Лицензии на рабочие места</text:p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G3" office:value-type="string">
            <text:p text:style-name="P50">46 000,00</text:p>
          </table:table-cell>
        </table:table-row>
        <table:table-row>
          <table:table-cell table:style-name="ТабличнаяЧастьДокумента.A2" office:value-type="string">
            <text:p text:style-name="P49"/>
          </table:table-cell>
          <table:table-cell table:style-name="ТабличнаяЧастьДокумента.A2" office:value-type="string">
            <text:p text:style-name="P49">Договор ИТС</text:p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G3" office:value-type="string">
            <text:p text:style-name="P50"/>
          </table:table-cell>
        </table:table-row>
        <table:table-row>
          <table:table-cell table:style-name="ТабличнаяЧастьДокумента.A2" office:value-type="string">
            <text:p text:style-name="P46">5</text:p>
          </table:table-cell>
          <table:table-cell table:style-name="ТабличнаяЧастьДокумента.A2" office:value-type="string">
            <text:p text:style-name="P46">Услуги по установке, тестированию, сопровождению и адаптации программ для ЭВМ системы "1С:Предприятие" по тарифному плану КП Стандарт <text:s/>8+4 на 12 месяцев</text:p>
          </table:table-cell>
          <table:table-cell table:style-name="ТабличнаяЧастьДокумента.A2" office:value-type="string">
            <text:p text:style-name="P39">12,000</text:p>
          </table:table-cell>
          <table:table-cell table:style-name="ТабличнаяЧастьДокумента.A2" office:value-type="string">
            <text:p text:style-name="P39">мес</text:p>
          </table:table-cell>
          <table:table-cell table:style-name="ТабличнаяЧастьДокумента.A2" office:value-type="string">
            <text:p text:style-name="P39">1 878,67</text:p>
          </table:table-cell>
          <table:table-cell table:style-name="ТабличнаяЧастьДокумента.A2" office:value-type="string">
            <text:p text:style-name="P39"/>
          </table:table-cell>
          <table:table-cell table:style-name="ТабличнаяЧастьДокумента.G3" office:value-type="string">
            <text:p text:style-name="P39">22 544,04</text:p>
          </table:table-cell>
        </table:table-row>
        <table:table-row>
          <table:table-cell table:style-name="ТабличнаяЧастьДокумента.A2" office:value-type="string">
            <text:p text:style-name="P49"/>
          </table:table-cell>
          <table:table-cell table:style-name="ТабличнаяЧастьДокумента.A2" office:value-type="string">
            <text:p text:style-name="P49">Итого по Договор ИТС</text:p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A2" office:value-type="string">
            <text:p text:style-name="P50"/>
          </table:table-cell>
          <table:table-cell table:style-name="ТабличнаяЧастьДокумента.G3" office:value-type="string">
            <text:p text:style-name="P50">22 544,04</text:p>
          </table:table-cell>
        </table:table-row>
        <table:table-row>
          <table:table-cell table:style-name="ТабличнаяЧастьДокумента.A2" office:value-type="string">
            <text:p text:style-name="P32"/>
          </table:table-cell>
          <table:table-cell table:style-name="ТабличнаяЧастьДокумента.A2" office:value-type="string">
            <text:p text:style-name="P39"><text:span text:style-name="T7">Итого:</text:span> </text:p>
          </table:table-cell>
          <table:table-cell table:style-name="ТабличнаяЧастьДокумента.A2" office:value-type="string">
            <text:p text:style-name="P32"/>
          </table:table-cell>
          <table:table-cell table:style-name="ТабличнаяЧастьДокумента.A2" office:value-type="string">
            <text:p text:style-name="P32"/>
          </table:table-cell>
          <table:table-cell table:style-name="ТабличнаяЧастьДокумента.A2" office:value-type="string">
            <text:p text:style-name="P32"/>
          </table:table-cell>
          <table:table-cell table:style-name="ТабличнаяЧастьДокумента.A2" office:value-type="string">
            <text:p text:style-name="P39"><text:s/></text:p>
          </table:table-cell>
          <table:table-cell table:style-name="ТабличнаяЧастьДокумента.G3" office:value-type="string">
            <text:p text:style-name="P39"><text:span text:style-name="T7">103 544,04</text:span> </text:p>
          </table:table-cell>
        </table:table-row>
      </table:table>
      <text:p text:style-name="P6"/>
      <text:p text:style-name="P2"><text:span text:style-name="T13">Примечание: </text:span></text:p>
      <text:p text:style-name="P2"><text:span text:style-name="T2">Общая стоимость составляет Сто три тысячи пятьсот сорок четыре рубля 04 копеек</text:span></text:p>
      <text:p text:style-name="P29">Бонусы от нас</text:p>
      <text:p text:style-name="P3"><text:span text:style-name="Основной_20_шрифт_20_абзаца"><text:span text:style-name="T31">Все любят подарки, а мы любим их дарить! И делаем это для наших клиентов. Текущие акции у нас прописаны на сайте http://www. tlink. ru/soft/offers/.</text:span></text:span></text:p>
      <text:p text:style-name="P8"/>
      <text:p text:style-name="P27">Поддержка программ 1С.</text:p>
      <text:p text:style-name="P28"/>
      <text:p text:style-name="P14"><text:soft-page-break/><text:span text:style-name="Основной_20_шрифт_20_абзаца"><text:span text:style-name="T32">Поддержка программ 1С доступна для официальных пользователей по договору информационно-технологического сопровождения (1С: ИТС).</text:span></text:span></text:p>
      <text:p text:style-name="P14"><text:span text:style-name="Основной_20_шрифт_20_абзаца"><text:span text:style-name="T32">1С: ИТС это совокупность программных продуктов и баз данных фирмы 1С, услуг линии технической поддержки фирмы 1С и услуг нашей компании.</text:span></text:span></text:p>
      <text:p text:style-name="P14"><text:span text:style-name="Основной_20_шрифт_20_абзаца"><text:span text:style-name="T32">Сервисы «1С» включают в себя: легальные обновления программ, сдачу регламентированной отчетности, методическую поддержку, автоматизированное резервное копирование баз данных, консультации аудиторов и многое другое.</text:span></text:span></text:p>
      <text:p text:style-name="P14"><text:span text:style-name="Основной_20_шрифт_20_абзаца"><text:span text:style-name="T32">Подробная информация обо всех сервисах представлена на портале 1С: ИТС </text:span></text:span><text:a xlink:type="simple" xlink:href="http://www.portal.1c.ru/" office:target-frame-name="_top" xlink:show="replace" text:style-name="Internet_20_link" text:visited-style-name="Visited_20_Internet_20_Link"><text:span text:style-name="Internet_20_link"><text:span text:style-name="T33">www. portal.1c. ru</text:span></text:span></text:a><text:span text:style-name="Internet_20_link"><text:span text:style-name="T16">.</text:span></text:span></text:p>
      <text:p text:style-name="P15">Для пользователей, заключивших договор 1С: ИТС, сертифицированные специалисты нашей компании проводят регламентированные работы, устанавливают обновления, оказывают консультации по работе с программой, помогают подключить и настроить сервисы и оказывают услуги по сопровождению.</text:p>
      <text:p text:style-name="P40"/>
      <text:p text:style-name="P7">Кратко о нас</text:p>
      <text:p text:style-name="P11">Каждый день мы сталкиваемся с разными задачами, простыми или сложными.</text:p>
      <text:p text:style-name="P11">Порой каждому требуется помощь профессионалов в их решении.</text:p>
      <text:p text:style-name="P12">Чего боится пользователь <text:span text:style-name="T27">1C</text:span>? Возможно, боится допустить ошибку в учете, просрочить сдачу отчетности, штрафов от налоговой, необходимость осваивать новую программу, и возможно, боится разочароваться в партнере по сопровождению 1С.</text:p>
      <text:p text:style-name="P12">Мы понимаем вас. Перечисленные выше проблемы для нас не пустой звук. Компания «Техно-линк» вот уже 20 лет занимается продажей, внедрением и сопровождением программ 1С других разработчиков, обучением пользователей.</text:p>
      <text:p text:style-name="P1"><text:span text:style-name="Основной_20_шрифт_20_абзаца"><text:span text:style-name="T21">Автоматизация учета для нас </text:span></text:span><text:span text:style-name="Основной_20_шрифт_20_абзаца"><text:span text:style-name="T20">- </text:span></text:span><text:span text:style-name="Основной_20_шрифт_20_абзаца"><text:span text:style-name="T21">как решение интересных ребусов и загадок. Как решить вопрос с возвратом подписанных документы? Как сделать сложный управленческий отчет? Что сделать, чтобы ваша программа 1С работала быстрее?</text:span></text:span></text:p>
      <text:p text:style-name="P10">Все это и многое другое нам по силам. Более того, мы искренне любим свою работу.</text:p>
      <text:p text:style-name="P16"><text:span text:style-name="Основной_20_шрифт_20_абзаца"><text:span text:style-name="T22">Наши компетенции:</text:span></text:span></text:p>
      <text:list xml:id="list9143875772415063366" text:style-name="WW8Num4">
        <text:list-item>
          <text:p text:style-name="P41"><text:s text:c="3"/><text:span text:style-name="T36">1С: Франчайзи</text:span></text:p>
        </text:list-item>
        <text:list-item>
          <text:p text:style-name="P42"><text:s text:c="3"/>1C: Центр сопровождения</text:p>
        </text:list-item>
        <text:list-item>
          <text:p text:style-name="P42"><text:s text:c="3"/>Кандидат в 1С: Центр ERP</text:p>
        </text:list-item>
        <text:list-item>
          <text:p text:style-name="P42"><text:s text:c="3"/>1С: Центр сетевой компетенции</text:p>
        </text:list-item>
        <text:list-item>
          <text:p text:style-name="P42"><text:s text:c="3"/>Официальный партнер компании "1С-Рарус"</text:p>
        </text:list-item>
        <text:list-item>
          <text:p text:style-name="P42"><text:s text:c="3"/>Центр реальной автоматизации</text:p>
        </text:list-item>
        <text:list-item>
          <text:p text:style-name="P42"><text:s text:c="3"/>Ключевой партнер по CRM-решениям на платформе "1С: Предприятие"</text:p>
        </text:list-item>
        <text:list-item>
          <text:p text:style-name="P43"><text:s text:c="3"/>Центр компетенции 1С по 54-ФЗ</text:p>
        </text:list-item>
      </text:list>
      <text:p text:style-name="P17">На нашей Линии консультаций пользователям помогают 5 квалифицированных специалистов. Электронным документооборотом (1С-ЭДО, 1С-Такском) уже пользуются около 90 наших клиентов.</text:p>
      <text:p text:style-name="P20">Фирма 1С постоянно подтверждает компетентность наших специалистов, у нас более 100 сертификатов 1С.</text:p>
      <text:p text:style-name="P18"><text:span text:style-name="Основной_20_шрифт_20_абзаца"><text:span text:style-name="T23">По договору сопровождения 1С: ИТС с нами работают более 600 компаний.</text:span></text:span></text:p>
      <text:p text:style-name="P18"><text:span text:style-name="Основной_20_шрифт_20_абзаца"><text:span text:style-name="T23">Возможностями электронной отчетности уже воспользовались более 900 наших клиентов. Только за последние два года нами реализовано более 3000 проектов автоматизации.</text:span></text:span></text:p>
      <text:p text:style-name="P18"><text:span text:style-name="Основной_20_шрифт_20_абзаца"><text:span text:style-name="T21">Это статистика, сухие цифры, но гораздо ценнее для нас живые отзывы, истории успеха наших клиентов, пользователей программ 1С. Все они собраны</text:span></text:span><text:span text:style-name="Основной_20_шрифт_20_абзаца"><text:span text:style-name="T19"> </text:span></text:span><text:a xlink:type="simple" xlink:href="http://www.tlink.ru/soft/project/" office:target-frame-name="_top" xlink:show="replace" text:style-name="Internet_20_link" text:visited-style-name="Visited_20_Internet_20_Link"><text:span text:style-name="Internet_20_link"><text:span text:style-name="T24">здесь на сайте</text:span></text:span></text:a><text:span text:style-name="Основной_20_шрифт_20_абзаца"><text:span text:style-name="T19">.</text:span></text:span></text:p>
      <text:p text:style-name="P19"><text:span text:style-name="Основной_20_шрифт_20_абзаца"><text:span text:style-name="T34">Важно:</text:span></text:span><text:span text:style-name="T35"> Предложения, указанные в настоящем документе, основаны на предварительно </text:span><text:soft-page-break/><text:span text:style-name="T35">полученной информации и могут быть скорректированы при дальнейших переговор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 2" svg:font-family="'Wingdings 2'" style:font-charset="x-symbol"/>
    <style:font-face style:name="OpenSymbol" svg:font-family="OpenSymbol, 'Arial Unicode MS'"/>
    <style:font-face style:name="Tahoma1" svg:font-family="Tahoma"/>
    <style:font-face style:name="Verdana" svg:font-family="Verdan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WW8Num2z0" style:family="text">
      <style:text-properties style:font-name="Wingdings 2" style:font-name-complex="OpenSymbol"/>
    </style:style>
    <style:style style:name="WW8Num2z1" style:family="text">
      <style:text-properties style:font-name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Symbol" style:font-name-complex="Open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73cm" fo:margin-bottom="1.997cm" fo:margin-left="2.02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24T16:55:23.26</meta:creation-date>
    <meta:editing-duration>PT1M24S</meta:editing-duration>
    <meta:editing-cycles>2</meta:editing-cycles>
    <meta:generator>OpenOffice/4.1.7$Win32 OpenOffice.org_project/417m1$Build-9800</meta:generator>
    <meta:initial-creator>1 </meta:initial-creator>
    <meta:document-statistic meta:table-count="2" meta:image-count="5" meta:object-count="0" meta:page-count="4" meta:paragraph-count="105" meta:word-count="615" meta:character-count="4495"/>
    <dc:date>2020-12-24T16:56:45.74</dc:date>
    <dc:creator>1 </dc:creator>
  </office:meta>
</office:document-meta>
</file>